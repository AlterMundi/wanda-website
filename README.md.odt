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WANDA - Worldwide Area Network for Distributed Astronomy</text:p>
      <text:p text:style-name="Standard"/>
      <text:p text:style-name="Standard">## Sitio Web Oficial del Proyecto WANDA</text:p>
      <text:p text:style-name="Standard"/>
      <text:p text:style-name="Standard">Red global descentralizada de teleradioscopios para ciencia ciudadana desarrollada por [AlterMundi](https://altermundi.net).</text:p>
      <text:p text:style-name="Standard"/>
      <text:p text:style-name="Standard">### 🚀 Demo</text:p>
      <text:p text:style-name="Standard">[Ver sitio web](https://tu-usuario.github.io/wanda-website)</text:p>
      <text:p text:style-name="Standard"/>
      <text:p text:style-name="Standard">### 📋 Descripción del Proyecto</text:p>
      <text:p text:style-name="Standard"/>
      <text:p text:style-name="Standard">WANDA democratiza la astronomía mediante una red de dispositivos modulares que permiten observación coordinada del cosmos, utilizando tecnología abierta para conectar escuelas, radioaficionados y observatorios ciudadanos a nivel mundial.</text:p>
      <text:p text:style-name="Standard"/>
      <text:p text:style-name="Standard">**Características principales:**</text:p>
      <text:p text:style-name="Standard">- Observación multiespectral (óptico + radioastronomía)</text:p>
      <text:p text:style-name="Standard">- Red descentralizada vía 44Mesh/44Net</text:p>
      <text:p text:style-name="Standard">- Hardware abierto basado en Raspberry Pi</text:p>
      <text:p text:style-name="Standard">- Enfoque educativo para escuelas y centros STEM</text:p>
      <text:p text:style-name="Standard">- Interferometría VLBI distribuida</text:p>
      <text:p text:style-name="Standard"/>
      <text:p text:style-name="Standard">### 🛠 Tecnologías</text:p>
      <text:p text:style-name="Standard"/>
      <text:p text:style-name="Standard">- HTML5 semántico</text:p>
      <text:p text:style-name="Standard">- CSS3 con Grid y Flexbox</text:p>
      <text:p text:style-name="Standard">- JavaScript vanilla (ES6+)</text:p>
      <text:p text:style-name="Standard">- Responsive design (mobile-first)</text:p>
      <text:p text:style-name="Standard">- GitHub Pages para hosting</text:p>
      <text:p text:style-name="Standard"/>
      <text:p text:style-name="Standard">### 📁 Estructura del Proyecto</text:p>
      <text:p text:style-name="Standard"/>
      <text:p text:style-name="Standard">```</text:p>
      <text:p text:style-name="Standard">wanda-website/</text:p>
      <text:p text:style-name="Standard">├── README.md</text:p>
      <text:p text:style-name="Standard">├── index.html <text:s text:c="13"/># Página principal</text:p>
      <text:p text:style-name="Standard">├── css/</text:p>
      <text:p text:style-name="Standard">│ <text:s text:c="2"/>├── styles.css <text:s text:c="9"/># Estilos principales</text:p>
      <text:p text:style-name="Standard">│ <text:s text:c="2"/>├── components.css <text:s text:c="5"/># Componentes reutilizables</text:p>
      <text:p text:style-name="Standard">│ <text:s text:c="2"/>└── responsive.css <text:s text:c="5"/># Media queries</text:p>
      <text:p text:style-name="Standard">├── js/</text:p>
      <text:p text:style-name="Standard">│ <text:s text:c="2"/>├── main.js <text:s text:c="11"/># Funcionalidad principal</text:p>
      <text:p text:style-name="Standard">│ <text:s text:c="2"/>├── navigation.js <text:s text:c="5"/># Sistema de navegación</text:p>
      <text:p text:style-name="Standard">│ <text:s text:c="2"/>└── animations.js <text:s text:c="5"/># Animaciones y efectos</text:p>
      <text:p text:style-name="Standard">├── assets/</text:p>
      <text:p text:style-name="Standard">│ <text:s text:c="2"/>├── images/</text:p>
      <text:p text:style-name="Standard">│ <text:s text:c="2"/>│ <text:s text:c="2"/>├── logos/ <text:s text:c="8"/># Logos de WANDA y AlterMundi</text:p>
      <text:p text:style-name="Standard">│ <text:s text:c="2"/>│ <text:s text:c="2"/>├── prototypes/ <text:s text:c="3"/># Renders OWNI y WANDONIAN</text:p>
      <text:p text:style-name="Standard">│ <text:s text:c="2"/>│ <text:s text:c="2"/>├── team/ <text:s text:c="9"/># Fotos del equipo</text:p>
      <text:p text:style-name="Standard">│ <text:s text:c="2"/>│ <text:s text:c="2"/>└── gallery/ <text:s text:c="6"/># Imágenes del proyecto</text:p>
      <text:p text:style-name="Standard">│ <text:s text:c="2"/>├── videos/ <text:s text:c="11"/># Videos demostrativos</text:p>
      <text:p text:style-name="Standard"><text:soft-page-break/>│ <text:s text:c="2"/>└── documents/ <text:s text:c="8"/># PDFs y documentación</text:p>
      <text:p text:style-name="Standard">├── pages/</text:p>
      <text:p text:style-name="Standard">│ <text:s text:c="2"/>├── proyecto.html <text:s text:c="5"/># Detalles del proyecto</text:p>
      <text:p text:style-name="Standard">│ <text:s text:c="2"/>├── tecnologia.html <text:s text:c="3"/># Especificaciones técnicas</text:p>
      <text:p text:style-name="Standard">│ <text:s text:c="2"/>├── educacion.html <text:s text:c="4"/># Programas educativos</text:p>
      <text:p text:style-name="Standard">│ <text:s text:c="2"/>├── equipo.html <text:s text:c="7"/># Equipo AlterMundi</text:p>
      <text:p text:style-name="Standard">│ <text:s text:c="2"/>├── blog.html <text:s text:c="9"/># Noticias y actualizaciones</text:p>
      <text:p text:style-name="Standard">│ <text:s text:c="2"/>└── contacto.html <text:s text:c="5"/># Información de contacto</text:p>
      <text:p text:style-name="Standard">└── .gitignore</text:p>
      <text:p text:style-name="Standard">```</text:p>
      <text:p text:style-name="Standard"/>
      <text:p text:style-name="Standard">### 🚀 Desarrollo Local</text:p>
      <text:p text:style-name="Standard"/>
      <text:p text:style-name="Standard">1. **Clonar el repositorio:**</text:p>
      <text:p text:style-name="Standard">```bash</text:p>
      <text:p text:style-name="Standard">git clone https://github.com/altermundi/wanda-website.git</text:p>
      <text:p text:style-name="Standard">cd wanda-website</text:p>
      <text:p text:style-name="Standard">```</text:p>
      <text:p text:style-name="Standard"/>
      <text:p text:style-name="Standard">2. **Servidor local simple:**</text:p>
      <text:p text:style-name="Standard">```bash</text:p>
      <text:p text:style-name="Standard"># Opción 1: Python</text:p>
      <text:p text:style-name="Standard">python -m http.server 8000</text:p>
      <text:p text:style-name="Standard"/>
      <text:p text:style-name="Standard"># Opción 2: Node.js</text:p>
      <text:p text:style-name="Standard">npx serve .</text:p>
      <text:p text:style-name="Standard"/>
      <text:p text:style-name="Standard"># Opción 3: VS Code Live Server extension</text:p>
      <text:p text:style-name="Standard">```</text:p>
      <text:p text:style-name="Standard"/>
      <text:p text:style-name="Standard">3. **Abrir en navegador:**</text:p>
      <text:p text:style-name="Standard">```</text:p>
      <text:p text:style-name="Standard">http://localhost:8000</text:p>
      <text:p text:style-name="Standard">```</text:p>
      <text:p text:style-name="Standard"/>
      <text:p text:style-name="Standard">### 📝 Guidelines de Desarrollo</text:p>
      <text:p text:style-name="Standard"/>
      <text:p text:style-name="Standard">#### HTML</text:p>
      <text:p text:style-name="Standard">- Usar elementos semánticos (`&lt;header&gt;`, `&lt;nav&gt;`, `&lt;main&gt;`, `&lt;section&gt;`, `&lt;article&gt;`)</text:p>
      <text:p text:style-name="Standard">- Atributos `alt` en todas las imágenes</text:p>
      <text:p text:style-name="Standard">- Estructura accesible (ARIA labels donde sea necesario)</text:p>
      <text:p text:style-name="Standard"/>
      <text:p text:style-name="Standard">#### CSS</text:p>
      <text:p text:style-name="Standard">- Mobile-first approach</text:p>
      <text:p text:style-name="Standard">- Variables CSS para colores y spacing</text:p>
      <text:p text:style-name="Standard">- Clases BEM para nomenclatura</text:p>
      <text:p text:style-name="Standard">- Grid y Flexbox para layouts</text:p>
      <text:p text:style-name="Standard"/>
      <text:p text:style-name="Standard">#### JavaScript</text:p>
      <text:p text:style-name="Standard">- ES6+ syntax</text:p>
      <text:p text:style-name="Standard">- Funciones modulares</text:p>
      <text:p text:style-name="Standard">- Event delegation</text:p>
      <text:p text:style-name="Standard"><text:soft-page-break/>- Progressive enhancement</text:p>
      <text:p text:style-name="Standard"/>
      <text:p text:style-name="Standard">### 🎨 Paleta de Colores</text:p>
      <text:p text:style-name="Standard"/>
      <text:p text:style-name="Standard">```css</text:p>
      <text:p text:style-name="Standard">:root {</text:p>
      <text:p text:style-name="Standard"><text:s text:c="2"/>--primary-blue: #1e3a8a;</text:p>
      <text:p text:style-name="Standard"><text:s text:c="2"/>--secondary-blue: #3b82f6;</text:p>
      <text:p text:style-name="Standard"><text:s text:c="2"/>--light-blue: #1e40af;</text:p>
      <text:p text:style-name="Standard"><text:s text:c="2"/>--text-primary: #2c3e50;</text:p>
      <text:p text:style-name="Standard"><text:s text:c="2"/>--text-secondary: #64748b;</text:p>
      <text:p text:style-name="Standard"><text:s text:c="2"/>--bg-light: #f8fafc;</text:p>
      <text:p text:style-name="Standard"><text:s text:c="2"/>--border-light: #e2e8f0;</text:p>
      <text:p text:style-name="Standard">}</text:p>
      <text:p text:style-name="Standard">```</text:p>
      <text:p text:style-name="Standard"/>
      <text:p text:style-name="Standard">### 📱 Responsividad</text:p>
      <text:p text:style-name="Standard"/>
      <text:p text:style-name="Standard">- **Mobile:** 320px - 767px</text:p>
      <text:p text:style-name="Standard">- **Tablet:** 768px - 1023px</text:p>
      <text:p text:style-name="Standard">- **Desktop:** 1024px+</text:p>
      <text:p text:style-name="Standard"/>
      <text:p text:style-name="Standard">### 🤝 Contribuciones</text:p>
      <text:p text:style-name="Standard"/>
      <text:p text:style-name="Standard">1. Fork del proyecto</text:p>
      <text:p text:style-name="Standard">2. Crear branch feature (`git checkout -b feature/nueva-seccion`)</text:p>
      <text:p text:style-name="Standard">3. Commit cambios (`git commit -m 'Add: nueva sección técnica'`)</text:p>
      <text:p text:style-name="Standard">4. Push al branch (`git push origin feature/nueva-seccion`)</text:p>
      <text:p text:style-name="Standard">5. Crear Pull Request</text:p>
      <text:p text:style-name="Standard"/>
      <text:p text:style-name="Standard">### 📋 TODO</text:p>
      <text:p text:style-name="Standard"/>
      <text:p text:style-name="Standard">- [ ] Integrar renders reales OWNI/WANDONIAN</text:p>
      <text:p text:style-name="Standard">- [ ] Añadir galería de prototipos</text:p>
      <text:p text:style-name="Standard">- [ ] Sección equipo AlterMundi con fotos</text:p>
      <text:p text:style-name="Standard">- [ ] Blog dinámico con noticias</text:p>
      <text:p text:style-name="Standard">- [ ] Formulario de contacto funcional</text:p>
      <text:p text:style-name="Standard">- [ ] Optimización SEO completa</text:p>
      <text:p text:style-name="Standard">- [ ] Versión en inglés</text:p>
      <text:p text:style-name="Standard"/>
      <text:p text:style-name="Standard">### 📄 Licencia</text:p>
      <text:p text:style-name="Standard"/>
      <text:p text:style-name="Standard">Este proyecto está bajo licencia [Creative Commons CC-BY-SA 4.0](https://creativecommons.org/licenses/by-sa/4.0/).</text:p>
      <text:p text:style-name="Standard"/>
      <text:p text:style-name="Standard">### 👥 Equipo AlterMundi</text:p>
      <text:p text:style-name="Standard"/>
      <text:p text:style-name="Standard">**Coordinación:**</text:p>
      <text:p text:style-name="Standard">- Nicolás Echaniz - Coordinador y Desarrollador Principal</text:p>
      <text:p text:style-name="Standard"/>
      <text:p text:style-name="Standard">**Desarrollo Software/Hardware:**</text:p>
      <text:p text:style-name="Standard">- Federico Bonino - Software, Electrónica e IA</text:p>
      <text:p text:style-name="Standard"><text:soft-page-break/>- Pablo Bustos (LU8HBP) - Software, Electrónica, Mecatrónica y Óptica</text:p>
      <text:p text:style-name="Standard">- Martín Fernández Méndez - Diseño Industrial y Desarrollo Universitario</text:p>
      <text:p text:style-name="Standard">- Bruno Lerner - Ingeniería Electrónica</text:p>
      <text:p text:style-name="Standard">- Anabella Scigliano - Desarrollo Software Jr.</text:p>
      <text:p text:style-name="Standard">- Santiago Cetran - Desarrollo Software Jr.</text:p>
      <text:p text:style-name="Standard"/>
      <text:p text:style-name="Standard">**Gestión y Operaciones:**</text:p>
      <text:p text:style-name="Standard">- Saira Asua - Talleres, Administración y Gestión Comunitaria</text:p>
      <text:p text:style-name="Standard">- Julián De la Reta - Desarrollo Audiovisual y Psicología</text:p>
      <text:p text:style-name="Standard">- Mariano Fernández Méndez - Desarrollo IA y Ciencias Sociales</text:p>
      <text:p text:style-name="Standard"/>
      <text:p text:style-name="Standard">### 📞 Contacto</text:p>
      <text:p text:style-name="Standard"/>
      <text:p text:style-name="Standard">- **Email:** nicoechaniz@altermundi.net</text:p>
      <text:p text:style-name="Standard">- **Teléfono:** +54 354 765 6593</text:p>
      <text:p text:style-name="Standard">- **Web:** [altermundi.net](https://altermundi.net)</text:p>
      <text:p text:style-name="Standard">- **GitHub:** [github.com/altermundi](https://github.com/altermundi)</text:p>
      <text:p text:style-name="Standard"/>
      <text:p text:style-name="Standard">---</text:p>
      <text:p text:style-name="Standard"/>
      <text:p text:style-name="Standard">*Desarrollado con ❤️ por AlterMundi - Tecnología Abierta para la Humanidad*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1T15:03:53.823047900</meta:creation-date>
    <dc:date>2025-09-21T15:04:19.824836700</dc:date>
    <meta:editing-duration>PT27S</meta:editing-duration>
    <meta:editing-cycles>1</meta:editing-cycles>
    <meta:document-statistic meta:table-count="0" meta:image-count="0" meta:object-count="0" meta:page-count="4" meta:paragraph-count="135" meta:word-count="668" meta:character-count="4690" meta:non-whitespace-character-count="3973"/>
    <meta:generator>LibreOffice/25.2.4.3$Windows_X86_64 LibreOffice_project/33e196637044ead23f5c3226cde09b47731f7e27</meta:generator>
  </office:meta>
</office:document-meta>
</file>